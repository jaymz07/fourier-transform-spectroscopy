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070000000C9A27F191.png" manifest:media-type="image/png"/>
  <manifest:file-entry manifest:full-path="Pictures/1000057800000086000000FA54128A58.svg" manifest:media-type="image/svg+xml"/>
  <manifest:file-entry manifest:full-path="Pictures/100000010000000800000008378CF864.png" manifest:media-type="image/png"/>
  <manifest:file-entry manifest:full-path="Pictures/100005F70000009A0000009F4A212383.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081cm" svg:stroke-color="#ff0000" draw:marker-start="" draw:marker-start-width="0.321cm" draw:marker-end="" draw:marker-end-width="0.321cm" draw:fill="solid" draw:textarea-vertical-align="middle" fo:padding-top="0.165cm" fo:padding-bottom="0.165cm" fo:padding-left="0.29cm" fo:padding-right="0.29cm" loext:decorative="false"/>
    </style:style>
    <style:style style:name="gr2" style:family="graphic" style:parent-style-name="objectwithoutfill">
      <style:graphic-properties svg:stroke-width="0.081cm" svg:stroke-color="#0000ff" draw:marker-start-width="0.321cm" draw:marker-end="Arrow" draw:marker-end-width="0.321cm" draw:fill="solid" draw:textarea-vertical-align="middle" fo:padding-top="0.165cm" fo:padding-bottom="0.165cm" fo:padding-left="0.29cm" fo:padding-right="0.29cm" loext:decorative="false"/>
    </style:style>
    <style:style style:name="gr3" style:family="graphic" style:parent-style-name="standard">
      <style:graphic-properties draw:fill-color="#000000" draw:textarea-horizontal-align="justify" draw:textarea-vertical-align="middle" draw:auto-grow-height="false" fo:min-height="1.336cm" fo:min-width="0cm" loext:decorative="false"/>
    </style:style>
    <style:style style:name="gr4" style:family="graphic" style:parent-style-name="objectwithoutfill">
      <style:graphic-properties svg:stroke-width="0.081cm" svg:stroke-color="#ff0000" draw:marker-start-width="0.321cm" draw:marker-end="Arrow" draw:marker-end-width="0.321cm" draw:fill="solid" draw:textarea-vertical-align="middle" fo:padding-top="0.165cm" fo:padding-bottom="0.165cm" fo:padding-left="0.29cm" fo:padding-right="0.29cm" loext:decorative="false"/>
    </style:style>
    <style:style style:name="gr5" style:family="graphic" style:parent-style-name="objectwithoutfill">
      <style:graphic-properties svg:stroke-width="0.081cm" svg:stroke-color="#ff0000" draw:marker-start-width="0.321cm" draw:marker-end="" draw:marker-end-width="0.321cm" draw:fill="solid" draw:textarea-vertical-align="middle" fo:padding-top="0.165cm" fo:padding-bottom="0.165cm" fo:padding-left="0.29cm" fo:padding-right="0.29cm" loext:decorative="false"/>
    </style:style>
    <style:style style:name="gr6" style:family="graphic" style:parent-style-name="objectwithoutfill">
      <style:graphic-properties svg:stroke-width="0.081cm" svg:stroke-color="#0000ff" draw:marker-start-width="0.321cm" draw:marker-end="" draw:marker-end-width="0.321cm" draw:fill="solid" draw:textarea-vertical-align="middle" fo:padding-top="0.165cm" fo:padding-bottom="0.165cm" fo:padding-left="0.29cm" fo:padding-right="0.29cm" loext:decorative="false"/>
    </style:style>
    <style:style style:name="gr7" style:family="graphic" style:parent-style-name="standard">
      <style:graphic-properties draw:textarea-horizontal-align="justify" draw:textarea-vertical-align="middle" draw:auto-grow-height="false" fo:min-height="1.336cm" fo:min-width="0cm" loext:decorative="false"/>
    </style:style>
    <style:style style:name="gr8" style:family="graphic" style:parent-style-name="standard">
      <style:graphic-properties draw:textarea-horizontal-align="justify" draw:textarea-vertical-align="middle" draw:auto-grow-height="false" fo:min-height="1.274cm" fo:min-width="2.04cm" style:writing-mode="lr-tb" loext:decorative="false"/>
      <style:paragraph-properties style:writing-mode="lr-tb"/>
    </style:style>
    <style:style style:name="gr9" style:family="graphic" style:parent-style-name="standard">
      <style:graphic-properties draw:textarea-horizontal-align="justify" draw:textarea-vertical-align="middle" draw:auto-grow-height="false" fo:min-height="1.437cm" fo:min-width="2.929cm" style:writing-mode="lr-tb"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1.111cm" fo:min-width="0cm" loext:decorative="false"/>
      <style:paragraph-properties style:writing-mode="lr-tb"/>
    </style:style>
    <style:style style:name="gr11" style:family="graphic" style:parent-style-name="standard">
      <style:graphic-properties draw:stroke="solid" draw:stroke-dash="Dash_20_Dot_20_4" svg:stroke-width="0.035cm" svg:stroke-color="#ff0000" draw:marker-start-width="0.216cm" draw:marker-end-width="0.216cm" draw:stroke-linejoin="round" svg:stroke-linecap="square" draw:textarea-horizontal-align="center" draw:textarea-vertical-align="middle" fo:padding-top="0.142cm" fo:padding-bottom="0.142cm" fo:padding-left="0.267cm" fo:padding-right="0.267cm" loext:decorative="false"/>
    </style:style>
    <style:style style:name="gr12" style:family="graphic" style:parent-style-name="standard">
      <style:graphic-properties draw:stroke="solid" draw:stroke-dash="Dash_20_Dot_20_4" svg:stroke-width="0.035cm" svg:stroke-color="#0000ff" draw:marker-start-width="0.215cm" draw:marker-end-width="0.215cm" draw:stroke-linejoin="round" svg:stroke-linecap="square" draw:textarea-horizontal-align="center" draw:textarea-vertical-align="middle" fo:padding-top="0.142cm" fo:padding-bottom="0.142cm" fo:padding-left="0.267cm" fo:padding-right="0.267cm" loext:decorative="false"/>
    </style:style>
    <style:style style:name="gr13" style:family="graphic" style:parent-style-name="objectwithoutfill">
      <style:graphic-properties svg:stroke-width="0.081cm" svg:stroke-color="#000000" draw:marker-start-width="0.321cm" draw:marker-end-width="0.321cm" draw:fill="none" draw:textarea-vertical-align="middle" fo:padding-top="0.165cm" fo:padding-bottom="0.165cm" fo:padding-left="0.29cm" fo:padding-right="0.29cm" loext:decorative="false"/>
    </style:style>
    <style:style style:name="gr14" style:family="graphic" style:parent-style-name="standard">
      <style:graphic-properties draw:stroke="none" svg:stroke-color="#0000ff" draw:fill-color="#0000ff" draw:textarea-horizontal-align="justify" draw:textarea-vertical-align="middle" draw:auto-grow-height="false" fo:min-height="0cm" fo:min-width="0cm" loext:decorative="false"/>
    </style:style>
    <style:style style:name="gr15" style:family="graphic" style:parent-style-name="standard">
      <style:graphic-properties draw:stroke="none" svg:stroke-color="#0000ff" draw:fill="solid" draw:fill-color="#0000ff" draw:textarea-horizontal-align="justify" draw:textarea-vertical-align="middle" draw:auto-grow-height="false" fo:min-height="0cm" fo:min-width="0.844cm" loext:decorative="false"/>
    </style:style>
    <style:style style:name="gr16" style:family="graphic" style:parent-style-name="standard">
      <style:graphic-properties draw:stroke="none" svg:stroke-color="#0000ff" draw:fill="solid" draw:fill-color="#0000ff" draw:textarea-horizontal-align="justify" draw:textarea-vertical-align="middle" draw:auto-grow-height="false" fo:min-height="0cm" fo:min-width="0cm" loext:decorative="false"/>
    </style:style>
    <style:style style:name="gr17" style:family="graphic" style:parent-style-name="standard">
      <style:graphic-properties draw:stroke="none" svg:stroke-color="#0000ff" draw:fill-color="#0000ff" draw:textarea-horizontal-align="justify" draw:textarea-vertical-align="middle" draw:auto-grow-height="false" fo:min-height="1.149cm" fo:min-width="0.877cm" draw:shadow="hidden" loext:decorative="false"/>
    </style:style>
    <style:style style:name="gr18" style:family="graphic" style:parent-style-name="standard">
      <style:graphic-properties draw:stroke="none" svg:stroke-color="#0000ff" draw:fill-color="#ff0000" draw:textarea-horizontal-align="justify" draw:textarea-vertical-align="middle" draw:auto-grow-height="false" fo:min-height="0cm" fo:min-width="0cm" loext:decorative="false"/>
    </style:style>
    <style:style style:name="gr19" style:family="graphic" style:parent-style-name="standard">
      <style:graphic-properties draw:stroke="none" svg:stroke-color="#0000ff" draw:fill="solid" draw:fill-color="#ff0000" draw:textarea-horizontal-align="justify" draw:textarea-vertical-align="middle" draw:auto-grow-height="false" fo:min-height="0cm" fo:min-width="0.844cm" loext:decorative="false"/>
    </style:style>
    <style:style style:name="gr20" style:family="graphic" style:parent-style-name="standard">
      <style:graphic-properties draw:stroke="none" svg:stroke-color="#0000ff" draw:fill="solid" draw:fill-color="#ff0000" draw:textarea-horizontal-align="justify" draw:textarea-vertical-align="middle" draw:auto-grow-height="false" fo:min-height="0cm" fo:min-width="0cm" loext:decorative="false"/>
    </style:style>
    <style:style style:name="gr21" style:family="graphic" style:parent-style-name="standard">
      <style:graphic-properties draw:stroke="none" svg:stroke-color="#0000ff" draw:fill-color="#ff0000" draw:textarea-horizontal-align="justify" draw:textarea-vertical-align="middle" draw:auto-grow-height="false" fo:min-height="1.149cm" fo:min-width="0.877cm" draw:shadow="hidden" loext:decorative="false"/>
    </style:style>
    <style:style style:name="gr22"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loext:decorative="false"/>
    </style:style>
    <style:style style:name="gr23" style:family="graphic" style:parent-style-name="objectwithoutfill">
      <style:graphic-properties svg:stroke-color="#000000" draw:marker-end="Arrowheads_20_1" draw:marker-end-width="0.3cm" draw:fill="none" draw:textarea-vertical-align="middle" loext:decorative="false"/>
    </style:style>
    <style:style style:name="gr2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5" style:family="graphic">
      <style:graphic-properties style:protect="size" loext:decorative="false"/>
    </style:style>
    <style:style style:name="pr1" style:family="presentation" style:parent-style-name="Default-notes">
      <style:graphic-properties draw:fill-color="#ffffff" draw:auto-grow-height="true" fo:min-height="13.364cm" loext:decorative="false"/>
      <style:paragraph-properties style:writing-mode="lr-tb"/>
    </style:style>
    <style:style style:name="P1" style:family="paragraph">
      <loext:graphic-properties draw:fill="solid"/>
      <style:paragraph-properties fo:text-align="center"/>
    </style:style>
    <style:style style:name="P2" style:family="paragraph">
      <loext:graphic-properties draw:fill-color="#000000"/>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writing-mode="lr-tb"/>
      <style:text-properties fo:font-size="18pt"/>
    </style:style>
    <style:style style:name="P6" style:family="paragraph">
      <loext:graphic-properties draw:fill="none" draw:fill-color="#ffffff"/>
      <style:text-properties fo:font-size="14pt" style:font-size-asian="14pt" style:font-size-complex="14pt"/>
    </style:style>
    <style:style style:name="P7" style:family="paragraph">
      <loext:graphic-properties draw:fill="none"/>
      <style:paragraph-properties fo:text-align="center"/>
    </style:style>
    <style:style style:name="P8" style:family="paragraph">
      <loext:graphic-properties draw:fill-color="#0000ff"/>
      <style:paragraph-properties fo:text-align="center"/>
    </style:style>
    <style:style style:name="P9" style:family="paragraph">
      <loext:graphic-properties draw:fill="solid" draw:fill-color="#0000ff"/>
      <style:paragraph-properties fo:text-align="center"/>
    </style:style>
    <style:style style:name="P10" style:family="paragraph">
      <loext:graphic-properties draw:fill-color="#ff0000"/>
      <style:paragraph-properties fo:text-align="center"/>
    </style:style>
    <style:style style:name="P11" style:family="paragraph">
      <loext:graphic-properties draw:fill="solid" draw:fill-color="#ff0000"/>
      <style:paragraph-properties fo:text-align="center"/>
    </style:style>
    <style:style style:name="P12" style:family="paragraph">
      <loext:graphic-properties draw:fill-color="#ffffff"/>
    </style:style>
    <style:style style:name="T1" style:family="text">
      <style:text-properties fo:font-size="18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line draw:style-name="gr1" draw:text-style-name="P1" draw:layer="layout" svg:x1="8.947cm" svg:y1="6.802cm" svg:x2="10.587cm" svg:y2="6.802cm">
          <text:p/>
        </draw:line>
        <draw:line draw:style-name="gr2" draw:text-style-name="P1" draw:layer="layout" svg:x1="3.87cm" svg:y1="4.242cm" svg:x2="8.841cm" svg:y2="4.242cm">
          <text:p/>
        </draw:line>
        <draw:custom-shape draw:style-name="gr3" draw:text-style-name="P2" draw:layer="layout" svg:width="0.15cm" svg:height="1.586cm" draw:transform="rotate (1.5707963267949) translate (8.001cm 0.423cm)">
          <text:p/>
          <draw:enhanced-geometry svg:viewBox="0 0 21600 21600" draw:type="rectangle" draw:enhanced-path="M 0 0 L 21600 0 21600 21600 0 21600 0 0 Z N"/>
        </draw:custom-shape>
        <draw:line draw:style-name="gr4" draw:text-style-name="P1" draw:layer="layout" svg:x1="4.777cm" svg:y1="4.042cm" svg:x2="9.095cm" svg:y2="4.042cm">
          <text:p/>
        </draw:line>
        <draw:line draw:style-name="gr5" draw:text-style-name="P1" draw:layer="layout" svg:x1="4.757cm" svg:y1="4.042cm" svg:x2="4.777cm" svg:y2="2.872cm">
          <text:p/>
        </draw:line>
        <draw:line draw:style-name="gr1" draw:text-style-name="P1" draw:layer="layout" svg:x1="8.994cm" svg:y1="4.045cm" svg:x2="8.994cm" svg:y2="0.423cm">
          <text:p/>
        </draw:line>
        <draw:line draw:style-name="gr6" draw:text-style-name="P1" draw:layer="layout" svg:x1="8.841cm" svg:y1="0.423cm" svg:x2="8.831cm" svg:y2="4.242cm">
          <text:p/>
        </draw:line>
        <draw:line draw:style-name="gr1" draw:text-style-name="P1" draw:layer="layout" svg:x1="9.03cm" svg:y1="4.037cm" svg:x2="13.069cm" svg:y2="4.034cm">
          <text:p/>
        </draw:line>
        <draw:line draw:style-name="gr6" draw:text-style-name="P1" draw:layer="layout" svg:x1="8.841cm" svg:y1="4.233cm" svg:x2="13.046cm" svg:y2="4.233cm">
          <text:p/>
        </draw:line>
        <draw:custom-shape draw:style-name="gr3" draw:text-style-name="P2" draw:layer="layout" svg:width="0.15cm" svg:height="1.586cm" svg:x="13.019cm" svg:y="3.255cm">
          <text:p/>
          <draw:enhanced-geometry svg:viewBox="0 0 21600 21600" draw:type="rectangle" draw:enhanced-path="M 0 0 L 21600 0 21600 21600 0 21600 0 0 Z N"/>
        </draw:custom-shape>
        <draw:line draw:style-name="gr6" draw:text-style-name="P1" draw:layer="layout" svg:x1="8.84cm" svg:y1="4.305cm" svg:x2="8.833cm" svg:y2="7.574cm">
          <text:p/>
        </draw:line>
        <draw:line draw:style-name="gr1" draw:text-style-name="P1" draw:layer="layout" svg:x1="8.994cm" svg:y1="6.853cm" svg:x2="8.994cm" svg:y2="4.124cm">
          <text:p/>
        </draw:line>
        <draw:custom-shape draw:style-name="gr7" draw:text-style-name="P3" draw:layer="layout" svg:width="0.15cm" svg:height="1.586cm" draw:transform="rotate (-0.785398163397449) translate (9.401cm 3.618cm)">
          <text:p/>
          <draw:enhanced-geometry svg:viewBox="0 0 21600 21600" draw:type="rectangle" draw:enhanced-path="M 0 0 L 21600 0 21600 21600 0 21600 0 0 Z N"/>
        </draw:custom-shape>
        <draw:custom-shape draw:style-name="gr8" draw:text-style-name="P5" draw:layer="layout" svg:width="2.54cm" svg:height="1.524cm" svg:x="3.42cm" svg:y="1.403cm">
          <text:p text:style-name="P4"><text:span text:style-name="T1">Test</text:span></text:p>
          <text:p text:style-name="P4"><text:span text:style-name="T1">Laser</text:span></text:p>
          <draw:enhanced-geometry svg:viewBox="0 0 21600 21600" draw:type="rectangle" draw:enhanced-path="M 0 0 L 21600 0 21600 21600 0 21600 0 0 Z N"/>
        </draw:custom-shape>
        <draw:custom-shape draw:style-name="gr9" draw:text-style-name="P5" draw:layer="layout" svg:width="3.429cm" svg:height="1.687cm" svg:x="0.49cm" svg:y="3.444cm">
          <text:p text:style-name="P4"><text:span text:style-name="T1">Reference Laser</text:span></text:p>
          <draw:enhanced-geometry svg:viewBox="0 0 21600 21600" draw:type="rectangle" draw:enhanced-path="M 0 0 L 21600 0 21600 21600 0 21600 0 0 Z N"/>
        </draw:custom-shape>
        <draw:custom-shape draw:style-name="gr7" draw:text-style-name="P3" draw:layer="layout" svg:width="0.15cm" svg:height="1.586cm" draw:transform="rotate (-0.785398163397449) translate (9.448cm 6.234cm)">
          <text:p/>
          <draw:enhanced-geometry svg:viewBox="0 0 21600 21600" draw:mirror-horizontal="true" draw:type="rectangle" draw:enhanced-path="M 0 0 L 21600 0 21600 21600 0 21600 0 0 Z N"/>
        </draw:custom-shape>
        <draw:frame draw:style-name="gr10" draw:text-style-name="P6" draw:layer="layout" svg:width="2.248cm" svg:height="1.361cm" svg:x="9.037cm" svg:y="2.115cm">
          <draw:text-box>
            <text:p><text:span text:style-name="T2">Beam</text:span></text:p>
            <text:p><text:span text:style-name="T2">Splitter</text:span></text:p>
          </draw:text-box>
        </draw:frame>
        <draw:path draw:style-name="gr11" draw:text-style-name="P3" draw:layer="layout" svg:width="5.906cm" svg:height="1.463cm" svg:x="15.454cm" svg:y="2.187cm" svg:viewBox="0 0 5907 1464" svg:d="M0 732c26-80 52-161 78-242 14-37 27-74 41-111 13-34 26-68 39-103 13-29 26-59 39-89 7-13 14-26 20-40 7-11 13-23 19-34 7-10 14-21 20-31 7-8 14-17 21-26 6-7 12-14 19-21 6-5 13-11 20-17 7-3 13-7 20-10 6-2 13-5 19-7 7 0 13 0 20 0 7 1 14 2 20 4 7 3 13 6 19 9 7 5 14 10 21 15 6 6 13 12 20 19 6 8 12 16 19 24 6 10 13 19 20 29 6 11 13 22 19 33 7 13 13 25 20 38 13 29 26 58 39 87 14 33 27 66 41 99 13 37 26 74 39 111 20 60 39 119 59 179 40 120 79 241 119 361 13 37 26 73 39 110 13 33 26 66 39 99 14 28 27 56 41 85 6 12 12 24 19 36 6 10 13 21 20 32 6 9 12 19 19 28 7 8 13 15 20 23 7 6 13 12 20 18 6 4 13 9 19 13 7 3 14 5 20 8 7 1 14 2 21 3 6-1 12-1 19-2 6-3 13-5 20-8 6-4 13-8 20-12 6-6 13-12 19-18 7-7 13-15 20-22 6-9 13-18 19-27 7-11 14-21 20-32 7-12 14-24 20-36 13-28 27-56 40-84 13-32 26-65 39-98 13-36 27-72 40-108 20-59 40-119 59-178 40-121 79-242 118-363 14-37 27-74 40-111 13-34 27-67 40-101 13-29 26-58 39-87 7-13 13-26 20-38 6-12 13-23 19-34 7-10 13-20 20-30 7-8 14-16 20-24 7-7 13-14 19-21 7-5 14-10 21-15 6-3 13-6 20-10 6-1 12-3 19-4 6 0 13 0 20 0 7 2 13 4 20 6 6 3 13 7 19 10 7 5 13 11 20 16 7 7 14 14 20 21 7 8 13 16 19 24 7 11 14 21 21 31 6 11 12 23 19 34 13 27 26 54 40 81 13 32 26 64 39 95 13 36 26 72 39 107 20 59 40 118 60 176 46 141 92 281 139 422 13 36 26 72 39 108 13 32 26 65 39 97 13 28 27 55 40 83 7 12 13 23 19 35 7 11 14 21 20 32 7 8 13 17 20 26 6 7 13 14 20 22 6 6 13 11 20 17 6 4 13 8 19 12 7 2 13 4 20 6 7 1 13 2 20 2 7-1 13-2 19-3 7-3 14-6 20-9 7-5 14-9 21-14 6-6 12-13 19-19 6-8 13-15 20-23 6-10 12-19 19-29 6-11 13-21 20-32 7-13 13-25 20-37 13-29 26-58 39-86 13-34 26-67 39-100 14-36 27-73 41-110 20-59 39-119 59-178 39-121 79-241 118-362 13-37 27-73 40-110 13-33 26-66 39-99 13-29 26-58 39-87 7-12 14-24 21-36 6-11 13-22 20-33 6-10 12-19 19-29 7-7 13-15 20-23 6-6 13-13 19-19 7-4 13-9 20-14 7-2 14-5 20-8 7-2 13-3 19-4 7 1 14 1 21 2 6 2 13 4 20 6 6 4 12 8 19 12 6 6 13 12 20 17 7 8 13 15 20 22 6 9 13 18 19 27 7 10 14 21 20 31 7 12 13 23 19 35 14 28 27 56 41 83 13 33 26 65 39 97 13 36 26 72 39 109 20 58 40 117 59 176 40 121 80 243 119 364 13 37 26 74 39 112 14 34 27 67 41 101 13 30 26 59 39 88 7 13 13 26 20 39 6 11 13 23 19 34 7 11 13 21 20 31 6 8 13 16 19 25 7 7 14 14 20 21 7 5 14 10 21 15 6 4 12 7 19 11 6 1 13 3 20 5 6 0 13 0 20 1 6-2 13-4 19-5 7-3 13-7 20-10 7-5 13-10 20-15 7-7 13-14 19-20 7-9 14-17 20-25 7-10 14-20 21-29 6-12 12-23 19-34 13-27 26-54 39-81 13-31 27-63 40-94 13-36 26-71 39-106 20-59 40-117 60-175 46-141 92-282 137-422 14-37 27-73 41-109 13-33 26-66 39-98 13-28 26-56 39-84 7-12 14-24 20-36 7-10 14-21 20-32 7-9 13-18 20-27 6-7 13-15 20-22 6-6 12-12 19-17 6-5 13-9 20-13 7-2 13-5 20-8 6 0 13-1 19-2 7 1 14 2 20 3 7 3 14 6 20 8 7 5 13 9 19 13 7 6 14 12 21 18 6 8 13 16 20 23 6 10 12 19 19 28 6 11 13 22 20 32 6 13 13 25 19 37 13 28 27 56 40 85 13 33 26 66 39 98 14 37 27 73 40 110 19 59 39 118 59 178 40 120 79 241 119 362 13 37 26 74 39 111 13 33 27 66 40 100 13 29 26 57 39 86 7 13 14 25 21 38 6 11 12 22 19 33 6 10 13 20 20 29 6 8 13 17 19 25 7 6 13 12 20 19 7 5 13 10 20 15 7 3 13 5 19 8 7 2 14 3 20 5 7-1 14-1 21-1 6-2 12-4 19-7 6-3 13-7 20-10 6-6 13-11 20-17 6-7 13-14 19-21 7-9 13-17 20-26 7-10 14-20 20-31 7-11 13-23 19-34 13-28 26-55 39-82 14-32 27-64 41-97 13-35 26-71 39-107 20-59 40-117 59-176 13-41 26-82 40-123">
          <text:p/>
        </draw:path>
        <draw:path draw:style-name="gr12" draw:text-style-name="P3" xml:id="id2" draw:id="id2" draw:layer="layout" svg:width="5.971cm" svg:height="1.34cm" svg:x="15.457cm" svg:y="5.976cm" svg:viewBox="0 0 5972 1341" svg:d="M0 671c13-74 27-148 40-222 13-65 26-131 40-196 6-27 13-55 20-82 6-22 13-45 20-68 7-17 13-34 20-51 7-12 13-23 20-35 7-5 14-10 20-16 7 1 13 2 19 3 7 7 14 15 21 22 6 13 13 27 20 40 6 19 13 38 20 57 7 24 13 48 20 72 6 29 13 57 19 86 13 67 27 135 40 202 34 180 67 361 100 541 7 30 13 61 20 91 7 26 14 52 20 78 7 20 14 41 20 62 7 16 14 31 21 47 6 9 12 19 19 28 6 4 13 7 20 11 7-3 13-6 20-9 7-10 13-19 20-28 7-15 14-30 20-46 7-20 14-41 20-61 7-26 13-51 20-77 6-30 13-60 20-90 13-69 27-137 40-206 27-147 53-293 80-440 6-32 13-65 20-97 6-29 13-58 20-87 7-24 13-49 20-73 7-20 13-39 20-58 7-14 13-27 19-41 7-8 14-15 20-23 7-1 14-2 21-4 6 5 13 10 20 14 6 12 13 23 20 34 7 17 13 33 20 50 6 23 13 45 19 67 7 27 13 54 20 81 14 65 27 130 41 195 33 182 66 364 99 546 7 31 14 63 20 94 7 27 14 55 20 83 7 23 14 46 21 69 6 17 12 35 19 52 6 12 13 24 20 36 7 5 13 11 20 17 7-1 13-1 20-2 7-7 14-14 20-21 7-13 14-26 20-38 7-19 13-38 20-56 6-24 13-48 20-72 6-28 13-56 20-85 13-67 27-134 40-201 33-180 67-361 100-542 7-30 13-60 20-91 7-26 13-52 20-78 7-22 13-43 19-64 7-16 14-32 20-48 7-10 14-20 21-30 6-3 13-7 20-11 6 3 13 5 20 8 7 9 13 18 20 26 6 15 13 30 19 44 7 21 13 41 20 62 7 25 14 50 20 75 7 30 14 60 21 89 13 69 26 137 40 206 26 147 53 293 79 440 7 33 14 65 21 98 6 29 13 58 20 87 6 25 12 50 19 75 6 19 13 39 20 59 7 14 13 28 20 42 7 8 13 16 20 24 7 1 14 3 20 5 7-5 14-9 20-14 7-10 13-21 20-32 6-16 13-33 20-49 6-22 13-44 20-66 7-27 13-54 20-80 7-31 13-62 20-93 13-70 26-140 39-210 27-146 54-291 81-437 7-32 13-63 20-95 7-28 13-56 19-83 7-23 14-47 20-70 7-18 14-36 21-54 6-12 13-25 20-37 6-6 13-12 20-18 7 1 13 1 20 1 6 6 13 13 19 19 7 13 13 25 20 38 7 18 14 37 20 55 7 23 14 47 21 70 6 28 13 56 20 84 13 67 26 133 39 200 33 181 67 362 101 543 6 31 12 61 19 92 6 26 13 53 20 80 7 21 13 43 20 64 7 16 13 32 20 49 7 10 14 20 20 30 7 5 14 9 20 13 7-2 13-4 20-7 6-8 13-16 20-25 6-14 13-29 20-43 7-20 13-40 20-60 7-25 13-50 20-75 7-29 14-59 20-88 13-68 26-136 40-204 26-147 53-294 80-441 7-33 13-66 19-99 7-29 14-58 20-88 7-25 14-49 21-74 6-20 13-40 20-61 6-14 13-28 20-43 7-8 13-17 20-25 6-2 13-4 19-6 7 4 13 8 20 12 7 10 14 21 20 31 7 16 14 32 21 48 6 22 13 43 20 65 6 26 13 53 20 80 6 30 13 61 19 91 13 70 27 140 40 209 27 146 53 292 80 439 6 31 13 63 20 95 7 28 13 56 20 84 7 24 13 47 20 71 7 18 14 36 20 54 7 13 14 26 20 39 7 6 13 12 20 19 6 0 13 0 20 0 6-6 13-12 20-18 7-12 13-24 20-37 7-18 13-36 20-54 7-23 14-46 20-69 7-28 13-56 19-83 14-67 27-133 41-199 33-181 66-363 99-544 7-31 14-61 21-92 6-27 13-54 20-80 6-22 13-44 20-66 7-17 13-33 20-50 6-10 13-21 19-32 7-4 13-9 20-13 7 1 14 3 20 5 7 8 14 16 21 24 6 14 13 28 20 42 6 20 13 39 20 59 6 25 13 49 19 74 7 29 13 58 20 87 13 68 27 136 40 204 27 147 53 294 80 441 7 33 13 66 20 99 7 30 13 60 20 89 7 25 14 51 20 76 7 20 14 41 21 61 6 15 12 29 19 44 6 9 13 18 20 27 6 2 13 5 20 8 7-4 13-8 20-12 7-10 13-20 20-29 7-16 14-32 20-48 7-21 13-43 19-64 7-26 14-53 21-79 6-30 13-60 20-91 13-69 27-138 40-208 27-146 53-292 80-438 6-33 13-65 20-97 6-28 13-56 20-85 7-24 13-47 20-71 6-19 13-37 19-56 7-13 13-26 20-39 7-7 14-13 20-20 7-1 14-2 21-2 6 6 13 11 20 17 6 12 13 23 20 35 6 18 13 35 19 53 7 23 13 46 20 69 7 28 13 55 20 83 14 65 27 131 41 197 33 181 66 363 99 544 7 31 14 62 20 93 7 27 14 54 21 81 6 22 12 45 19 67 6 17 13 34 20 51 6 11 13 22 20 33 7 5 13 10 20 14 7-1 13-2 20-4 7-7 14-15 20-22 7-14 13-28 19-41 7-20 14-39 21-58 6-25 13-49 20-74 6-29 13-57 20-86 13-68 27-135 40-203 27-147 53-294 80-441 13-63 27-126 40-189 6-26 13-52 19-77 7-21 13-41 20-62 7-15 14-30 20-46 7-9 14-18 21-27 6-3 13-6 20-9 6 3 13 7 20 10 6 10 13 19 19 29 7 15 13 31 20 47 7 20 13 41 20 62 7 26 14 52 20 78 7 30 14 60 21 90 13 69 26 139 39 208 27 146 53 293 80 439 7 32 14 64 21 96 6 29 12 58 19 87 6 24 13 47 20 71 6 19 13 39 20 58 7 13 13 26 20 39 7 8 13 15 20 22 7 1 13 2 19 3 7-5 14-10 20-16 7-11 14-23 21-34 6-17 13-35 20-52 6-23 13-45 20-68 7-27 13-54 20-81 13-66 26-131 39-197 14-73 27-147 41-220">
          <text:p/>
        </draw:path>
        <draw:line draw:style-name="gr13" draw:text-style-name="P7" xml:id="id4" draw:id="id4" draw:layer="layout" svg:x1="15.454cm" svg:y1="1.638cm" svg:x2="15.454cm" svg:y2="4.198cm">
          <text:p/>
        </draw:line>
        <draw:line draw:style-name="gr13" draw:text-style-name="P7" draw:layer="layout" svg:x1="15.451cm" svg:y1="4.192cm" svg:x2="21.761cm" svg:y2="4.192cm">
          <text:p/>
        </draw:line>
        <draw:line draw:style-name="gr13" draw:text-style-name="P7" draw:layer="layout" svg:x1="15.454cm" svg:y1="5.144cm" svg:x2="15.454cm" svg:y2="7.704cm">
          <text:p/>
        </draw:line>
        <draw:line draw:style-name="gr13" draw:text-style-name="P7" draw:layer="layout" svg:x1="15.451cm" svg:y1="7.698cm" svg:x2="21.761cm" svg:y2="7.698cm">
          <text:p/>
        </draw:line>
        <draw:custom-shape draw:style-name="gr14" draw:text-style-name="P8" draw:layer="layout" svg:width="0.521cm" svg:height="0.462cm" draw:transform="rotate (1.5707963267949) translate (8.591cm 8.454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8" draw:layer="layout" svg:width="0.093cm" svg:height="0.082cm" draw:transform="skewX (0.0486946861306418) rotate (-2.4937264352495) translate (8.583cm 7.7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8" draw:layer="layout" svg:width="0.09cm" svg:height="0.084cm" draw:transform="skewX (-0.0118682389135614) rotate (-2.52898208613978) translate (8.469cm 7.8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9" xml:id="id1" draw:id="id1" draw:layer="layout" svg:width="1.344cm" svg:height="0.035cm" svg:x="8.181cm" svg:y="8.179cm">
          <text:p/>
          <draw:enhanced-geometry svg:viewBox="0 0 21600 21600" draw:type="rectangle" draw:enhanced-path="M 0 0 L 21600 0 21600 21600 0 21600 0 0 Z N"/>
        </draw:custom-shape>
        <draw:custom-shape draw:style-name="gr16" draw:text-style-name="P9" draw:layer="layout" svg:width="0.467cm" svg:height="0.035cm" draw:transform="rotate (1.5707963267949) translate (9.017cm 8.424cm)">
          <text:p/>
          <draw:enhanced-geometry svg:viewBox="0 0 21600 21600" draw:type="rectangle" draw:enhanced-path="M 0 0 L 21600 0 21600 21600 0 21600 0 0 Z N"/>
        </draw:custom-shape>
        <draw:path draw:style-name="gr17" draw:text-style-name="P8" draw:layer="layout" svg:width="0.826cm" svg:height="0.84cm" svg:x="8.419cm" svg:y="7.77cm" svg:viewBox="0 0 827 841" svg:d="M760 625c35-62 54-132 54-204 0-71-19-141-54-203s-86-113-147-149c-60-36-129-55-200-55-70 0-139 19-200 55-60 36-111 87-146 149s-54 132-54 203c0 72 19 142 54 204 35 61 86 113 146 149 61 35 130 54 201 54 70 0 139-19 199-54 61-36 112-88 147-149zM772 631c-37 64-89 117-151 153-63 37-135 57-207 57-73 0-145-20-207-57-63-36-115-89-152-153-36-64-55-137-55-211s19-146 55-210c37-64 89-117 152-153 62-37 134-57 207-57 72 0 144 20 207 57 62 36 114 89 151 153 36 64 55 136 55 210s-19 147-55 211z">
          <text:p/>
        </draw:path>
        <draw:custom-shape draw:style-name="gr16" draw:text-style-name="P9" draw:layer="layout" svg:width="0.272cm" svg:height="0.011cm" draw:transform="rotate (-0.950157244785714) translate (8.344cm 7.461cm)">
          <text:p/>
          <draw:enhanced-geometry svg:viewBox="0 0 21600 21600" draw:type="rectangle" draw:enhanced-path="M 0 0 L 21600 0 21600 21600 0 21600 0 0 Z N"/>
        </draw:custom-shape>
        <draw:custom-shape draw:style-name="gr16" draw:text-style-name="P9" draw:layer="layout" svg:width="0.272cm" svg:height="0.011cm" draw:transform="rotate (-0.950157244785714) translate (8.23cm 7.559cm)">
          <text:p/>
          <draw:enhanced-geometry svg:viewBox="0 0 21600 21600" draw:type="rectangle" draw:enhanced-path="M 0 0 L 21600 0 21600 21600 0 21600 0 0 Z N"/>
        </draw:custom-shape>
        <draw:custom-shape draw:style-name="gr18" draw:text-style-name="P10" draw:layer="layout" svg:width="0.521cm" svg:height="0.462cm" draw:transform="rotate (1.5707963267949) translate (11.191cm 7.055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10" draw:layer="layout" svg:width="0.093cm" svg:height="0.082cm" draw:transform="skewX (0.0486946861306418) rotate (-2.4937264352495) translate (11.183cm 6.32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10" draw:layer="layout" svg:width="0.09cm" svg:height="0.084cm" draw:transform="skewX (-0.0118682389135614) rotate (-2.52898208613978) translate (11.069cm 6.42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11" xml:id="id3" draw:id="id3" draw:layer="layout" svg:width="1.344cm" svg:height="0.035cm" svg:x="10.781cm" svg:y="6.78cm">
          <text:p/>
          <draw:enhanced-geometry svg:viewBox="0 0 21600 21600" draw:type="rectangle" draw:enhanced-path="M 0 0 L 21600 0 21600 21600 0 21600 0 0 Z N"/>
        </draw:custom-shape>
        <draw:custom-shape draw:style-name="gr20" draw:text-style-name="P11" draw:layer="layout" svg:width="0.467cm" svg:height="0.035cm" draw:transform="rotate (1.5707963267949) translate (11.617cm 7.025cm)">
          <text:p/>
          <draw:enhanced-geometry svg:viewBox="0 0 21600 21600" draw:type="rectangle" draw:enhanced-path="M 0 0 L 21600 0 21600 21600 0 21600 0 0 Z N"/>
        </draw:custom-shape>
        <draw:path draw:style-name="gr21" draw:text-style-name="P10" draw:layer="layout" svg:width="0.826cm" svg:height="0.84cm" svg:x="11.019cm" svg:y="6.371cm" svg:viewBox="0 0 827 841" svg:d="M760 625c35-62 54-132 54-204 0-71-19-141-54-203s-86-113-147-149c-60-36-129-55-200-55-70 0-139 19-200 55-60 36-111 87-146 149s-54 132-54 203c0 72 19 142 54 204 35 61 86 113 146 149 61 35 130 54 201 54 70 0 139-19 199-54 61-36 112-88 147-149zM772 631c-37 64-89 117-151 153-63 37-135 57-207 57-73 0-145-20-207-57-63-36-115-89-152-153-36-64-55-137-55-211s19-146 55-210c37-64 89-117 152-153 62-37 134-57 207-57 72 0 144 20 207 57 62 36 114 89 151 153 36 64 55 136 55 210s-19 147-55 211z">
          <text:p/>
        </draw:path>
        <draw:custom-shape draw:style-name="gr20" draw:text-style-name="P11" draw:layer="layout" svg:width="0.272cm" svg:height="0.011cm" draw:transform="rotate (-0.950157244785714) translate (10.944cm 6.062cm)">
          <text:p/>
          <draw:enhanced-geometry svg:viewBox="0 0 21600 21600" draw:type="rectangle" draw:enhanced-path="M 0 0 L 21600 0 21600 21600 0 21600 0 0 Z N"/>
        </draw:custom-shape>
        <draw:custom-shape draw:style-name="gr20" draw:text-style-name="P11" draw:layer="layout" svg:width="0.272cm" svg:height="0.011cm" draw:transform="rotate (-0.950157244785714) translate (10.83cm 6.16cm)">
          <text:p/>
          <draw:enhanced-geometry svg:viewBox="0 0 21600 21600" draw:type="rectangle" draw:enhanced-path="M 0 0 L 21600 0 21600 21600 0 21600 0 0 Z N"/>
        </draw:custom-shape>
        <draw:connector draw:style-name="gr22" draw:text-style-name="P7" draw:layer="layout" draw:type="curve" draw:line-skew="0.859cm" svg:x1="9.525cm" svg:y1="8.196cm" svg:x2="15.457cm" svg:y2="6.646cm" draw:start-shape="id1" draw:start-glue-point="1" draw:end-shape="id2" draw:end-glue-point="3" svg:d="M9525 8196c5722 0 2757-1550 5932-1550" svg:viewBox="0 0 5933 1551">
          <text:p/>
        </draw:connector>
        <draw:connector draw:style-name="gr22" draw:text-style-name="P7" draw:layer="layout" draw:type="curve" svg:x1="12.125cm" svg:y1="6.797cm" svg:x2="15.454cm" svg:y2="2.918cm" draw:start-shape="id3" draw:start-glue-point="1" draw:end-shape="id4" draw:end-glue-point="1" svg:d="M12125 6797c2466 0 802-3879 3329-3879" svg:viewBox="0 0 3330 3880">
          <text:p/>
        </draw:connector>
        <draw:line draw:style-name="gr23" draw:text-style-name="P7" draw:layer="layout" svg:x1="12.454cm" svg:y1="2.74cm" svg:x2="13.335cm" svg:y2="2.74cm">
          <text:p/>
        </draw:line>
        <draw:frame draw:style-name="gr24" draw:text-style-name="P3" draw:layer="layout" svg:width="0.428cm" svg:height="0.442cm" svg:x="12.627cm" svg:y="2.055cm">
          <draw:image xlink:href="Pictures/100005F70000009A0000009F4A212383.svg" xlink:type="simple" xlink:show="embed" xlink:actuate="onLoad" draw:mime-type="image/svg+xml">
            <text:p/>
          </draw:image>
          <draw:image xlink:href="Pictures/100000010000000800000008378CF864.png" xlink:type="simple" xlink:show="embed" xlink:actuate="onLoad" draw:mime-type="image/png"/>
          <svg:title>TexMaths</svg:title>
          <svg:desc>28§display§v§svg§600§TRUE§</svg:desc>
        </draw:frame>
        <draw:frame draw:style-name="gr24" draw:text-style-name="P3" draw:layer="layout" svg:width="0.372cm" svg:height="0.697cm" svg:x="21.855cm" svg:y="3.829cm">
          <draw:image xlink:href="Pictures/1000057800000086000000FA54128A58.svg" xlink:type="simple" xlink:show="embed" xlink:actuate="onLoad" draw:mime-type="image/svg+xml">
            <text:p/>
          </draw:image>
          <draw:image xlink:href="Pictures/10000001000000070000000C9A27F191.png" xlink:type="simple" xlink:show="embed" xlink:actuate="onLoad" draw:mime-type="image/png"/>
          <svg:title>TexMaths</svg:title>
          <svg:desc>28§display§t§svg§600§TRUE§</svg:desc>
        </draw:frame>
        <draw:frame draw:style-name="gr24" draw:text-style-name="P3" draw:layer="layout" svg:width="0.372cm" svg:height="0.697cm" svg:x="21.855cm" svg:y="7.33cm">
          <draw:image xlink:href="Pictures/1000057800000086000000FA54128A58.svg" xlink:type="simple" xlink:show="embed" xlink:actuate="onLoad" draw:mime-type="image/svg+xml">
            <text:p/>
          </draw:image>
          <draw:image xlink:href="Pictures/10000001000000070000000C9A27F191.png" xlink:type="simple" xlink:show="embed" xlink:actuate="onLoad" draw:mime-type="image/png"/>
          <svg:title>TexMaths</svg:title>
          <svg:desc>28§display§t§svg§600§TRUE§</svg:desc>
        </draw:frame>
        <draw:custom-shape draw:style-name="gr7" draw:text-style-name="P3" draw:layer="layout" svg:width="0.15cm" svg:height="1.586cm" draw:transform="rotate (0.785398163397448) translate (4.27cm 3.74cm)">
          <text:p/>
          <draw:enhanced-geometry svg:viewBox="0 0 21600 21600" draw:type="rectangle" draw:enhanced-path="M 0 0 L 21600 0 21600 21600 0 21600 0 0 Z N"/>
        </draw:custom-shape>
        <presentation:notes draw:style-name="dp2">
          <draw:page-thumbnail draw:style-name="gr25" draw:layer="layout" svg:width="19.798cm" svg:height="11.136cm" svg:x="0.6cm" svg:y="2.257cm" draw:page-number="1" presentation:class="page"/>
          <draw:frame presentation:style-name="pr1"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81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24cm" fo:margin-bottom="0cm" fo:text-indent="0cm"/>
      <style:text-properties fo:font-size="15.8000001907349pt" style:font-size-asian="28pt" style:font-size-complex="28pt"/>
    </style:style>
    <style:style style:name="Default-outline3" style:family="presentation" style:parent-style-name="Default-outline2">
      <style:paragraph-properties fo:margin-left="0cm" fo:margin-right="0cm" fo:margin-top="0.168cm" fo:margin-bottom="0cm" fo:text-indent="0cm"/>
      <style:text-properties fo:font-size="13.5pt" style:font-size-asian="24pt" style:font-size-complex="24pt"/>
    </style:style>
    <style:style style:name="Default-outline4" style:family="presentation" style:parent-style-name="Default-outline3">
      <style:paragraph-properties fo:margin-left="0cm" fo:margin-right="0cm" fo:margin-top="0.111cm" fo:margin-bottom="0cm" fo:text-indent="0cm"/>
      <style:text-properties fo:font-size="11.3000001907349pt" style:font-size-asian="20pt" style:font-size-complex="20pt"/>
    </style:style>
    <style:style style:name="Default-outline5" style:family="presentation" style:parent-style-name="Default-outline4">
      <style:paragraph-properties fo:margin-left="0cm" fo:margin-right="0cm" fo:margin-top="0.054cm" fo:margin-bottom="0cm" fo:text-indent="0cm"/>
      <style:text-properties fo:font-size="11.3000001907349pt" style:font-size-asian="20pt" style:font-size-complex="20pt"/>
    </style:style>
    <style:style style:name="Default-outline6" style:family="presentation" style:parent-style-name="Default-outline5">
      <style:paragraph-properties fo:margin-left="0cm" fo:margin-right="0cm" fo:margin-top="0.054cm" fo:margin-bottom="0cm" fo:text-indent="0cm"/>
      <style:text-properties fo:font-size="11.3000001907349pt" style:font-size-asian="20pt" style:font-size-complex="20pt"/>
    </style:style>
    <style:style style:name="Default-outline7" style:family="presentation" style:parent-style-name="Default-outline6">
      <style:paragraph-properties fo:margin-left="0cm" fo:margin-right="0cm" fo:margin-top="0.054cm" fo:margin-bottom="0cm" fo:text-indent="0cm"/>
      <style:text-properties fo:font-size="11.3000001907349pt" style:font-size-asian="20pt" style:font-size-complex="20pt"/>
    </style:style>
    <style:style style:name="Default-outline8" style:family="presentation" style:parent-style-name="Default-outline7">
      <style:paragraph-properties fo:margin-left="0cm" fo:margin-right="0cm" fo:margin-top="0.054cm" fo:margin-bottom="0cm" fo:text-indent="0cm"/>
      <style:text-properties fo:font-size="11.3000001907349pt" style:font-size-asian="20pt" style:font-size-complex="20pt"/>
    </style:style>
    <style:style style:name="Default-outline9" style:family="presentation" style:parent-style-name="Default-outline8">
      <style:paragraph-properties fo:margin-left="0cm" fo:margin-right="0cm" fo:margin-top="0.054cm" fo:margin-bottom="0cm" fo:text-indent="0cm"/>
      <style:text-properties fo:font-size="11.3000001907349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2.86cm" fo:page-height="8.8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3.499cm" svg:x="1cm" svg:y="4.523cm"/>
      <draw:page-thumbnail draw:layer="backgroundobjects" svg:width="8.999cm" svg:height="3.499cm" svg:x="1cm" svg:y="13.099cm"/>
      <draw:page-thumbnail draw:layer="backgroundobjects" svg:width="8.999cm" svg:height="3.499cm" svg:x="1cm" svg:y="21.675cm"/>
      <draw:page-thumbnail draw:layer="backgroundobjects" svg:width="8.999cm" svg:height="3.499cm" svg:x="11cm" svg:y="4.523cm"/>
      <draw:page-thumbnail draw:layer="backgroundobjects" svg:width="8.999cm" svg:height="3.499cm" svg:x="11cm" svg:y="13.099cm"/>
      <draw:page-thumbnail draw:layer="backgroundobjects" svg:width="8.999cm" svg:height="3.499cm" svg:x="11cm" svg:y="21.675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0.572cm" svg:height="1.484cm" svg:x="1.141cm" svg:y="0.354cm" presentation:class="title" presentation:placeholder="true">
        <draw:text-box/>
      </draw:frame>
      <draw:frame presentation:style-name="Default-outline1" draw:layer="backgroundobjects" svg:width="20.572cm" svg:height="5.156cm" svg:x="1.141cm" svg:y="2.079cm" presentation:class="outline" presentation:placeholder="true">
        <draw:text-box/>
      </draw:frame>
      <draw:frame presentation:style-name="Mpr1" draw:text-style-name="MP2" draw:layer="backgroundobjects" svg:width="5.326cm" svg:height="0.613cm" svg:x="1.141cm" svg:y="8.098cm" presentation:class="date-time">
        <draw:text-box>
          <text:p text:style-name="MP1"><text:span text:style-name="MT1"><presentation:date-time/></text:span></text:p>
        </draw:text-box>
      </draw:frame>
      <draw:frame presentation:style-name="Mpr1" draw:text-style-name="MP6" draw:layer="backgroundobjects" svg:width="7.247cm" svg:height="0.613cm" svg:x="7.814cm" svg:y="8.098cm" presentation:class="footer">
        <draw:text-box>
          <text:p text:style-name="MP5"><text:span text:style-name="MT1"><presentation:footer/></text:span></text:p>
        </draw:text-box>
      </draw:frame>
      <draw:frame presentation:style-name="Mpr1" draw:text-style-name="MP4" draw:layer="backgroundobjects" svg:width="5.326cm" svg:height="0.613cm" svg:x="16.387cm" svg:y="8.09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3T01:09:32.668347115</meta:creation-date>
    <dc:date>2025-09-05T23:13:10.073313881</dc:date>
    <meta:editing-duration>PT7M10S</meta:editing-duration>
    <meta:editing-cycles>2</meta:editing-cycles>
    <meta:generator>LibreOffice/24.2.7.2$Linux_X86_64 LibreOffice_project/420$Build-2</meta:generator>
    <meta:document-statistic meta:object-count="69"/>
  </office:meta>
</office:document-meta>
</file>