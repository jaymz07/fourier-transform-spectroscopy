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5E00000014D7882015.png" manifest:media-type="image/png"/>
  <manifest:file-entry manifest:full-path="Pictures/100030AC0000078E0000019913D393AB.svg" manifest:media-type="image/svg+xml"/>
  <manifest:file-entry manifest:full-path="Pictures/100000010000004A00000010AE8FCC09.png" manifest:media-type="image/png"/>
  <manifest:file-entry manifest:full-path="Pictures/100000010000000D0000000C8EE22471.png" manifest:media-type="image/png"/>
  <manifest:file-entry manifest:full-path="Pictures/1000061F0000010D000000F05F3DD127.svg" manifest:media-type="image/svg+xml"/>
  <manifest:file-entry manifest:full-path="Pictures/10002D58000005ED0000014D50BEF83D.svg" manifest:media-type="image/svg+xml"/>
  <manifest:file-entry manifest:full-path="Pictures/1000000100000122000000AE44EDF85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svg:stroke-color="#800080" draw:marker-start-width="0.321cm" draw:marker-end-width="0.321cm" draw:fill="solid" draw:textarea-vertical-align="middle" fo:padding-top="0.165cm" fo:padding-bottom="0.165cm" fo:padding-left="0.29cm" fo:padding-right="0.29cm" loext:decorative="false"/>
    </style:style>
    <style:style style:name="gr2" style:family="graphic" style:parent-style-name="objectwithoutfill">
      <style:graphic-properties svg:stroke-width="0.081cm" svg:stroke-color="#00a933" draw:marker-start-width="0.321cm" draw:marker-end-width="0.321cm" draw:fill="solid" draw:textarea-vertical-align="middle" fo:padding-top="0.165cm" fo:padding-bottom="0.165cm" fo:padding-left="0.29cm" fo:padding-right="0.29cm" loext:decorative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1.336cm" fo:min-width="0cm" loext:decorative="false"/>
    </style:style>
    <style:style style:name="gr4" style:family="graphic" style:parent-style-name="objectwithoutfill">
      <style:graphic-properties svg:stroke-width="0.081cm" svg:stroke-color="#00a933" draw:marker-start-width="0.321cm" draw:marker-end="Arrow" draw:marker-end-width="0.321cm" draw:fill="solid" draw:textarea-vertical-align="middle" fo:padding-top="0.165cm" fo:padding-bottom="0.165cm" fo:padding-left="0.29cm" fo:padding-right="0.29cm" loext:decorative="false"/>
    </style:style>
    <style:style style:name="gr5" style:family="graphic" style:parent-style-name="objectwithoutfill">
      <style:graphic-properties svg:stroke-width="0.081cm" svg:stroke-color="#ff0000" draw:marker-start-width="0.321cm" draw:marker-end="Arrow" draw:marker-end-width="0.321cm" draw:fill="solid" draw:textarea-vertical-align="middle" fo:padding-top="0.165cm" fo:padding-bottom="0.165cm" fo:padding-left="0.29cm" fo:padding-right="0.29cm" loext:decorative="false"/>
    </style:style>
    <style:style style:name="gr6" style:family="graphic" style:parent-style-name="objectwithoutfill">
      <style:graphic-properties svg:stroke-width="0.081cm" svg:stroke-color="#800080" draw:marker-start="Arrow" draw:marker-start-width="0.321cm" draw:marker-end="" draw:marker-end-width="0.321cm" draw:fill="solid" draw:textarea-vertical-align="middle" fo:padding-top="0.165cm" fo:padding-bottom="0.165cm" fo:padding-left="0.29cm" fo:padding-right="0.29cm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1.336cm" fo:min-width="0cm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 loext:decorative="false"/>
    </style:style>
    <style:style style:name="gr10" style:family="graphic">
      <style:graphic-properties style:writing-mode="lr-tb" loext:decorative="false"/>
    </style:style>
    <style:style style:name="gr11" style:family="graphic">
      <style:graphic-properties loext:decorative="false"/>
    </style:style>
    <style:style style:name="gr12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 loext:decorative="false"/>
    </style:style>
    <style:style style:name="gr13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14" style:family="graphic" style:parent-style-name="standard">
      <style:graphic-properties draw:textarea-horizontal-align="justify" draw:textarea-vertical-align="middle" draw:auto-grow-height="false" fo:min-height="1.274cm" fo:min-width="2.04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16" style:family="graphic" style:parent-style-name="standard">
      <style:graphic-properties draw:stroke="none" draw:stroke-dash="Dash_20_Dot_20_4" svg:stroke-width="0cm" draw:stroke-linejoin="none" svg:stroke-linecap="butt" draw:fill="solid" draw:fill-color="#2ca02c" draw:textarea-horizontal-align="center" draw:textarea-vertical-align="middle" loext:decorative="false"/>
    </style:style>
    <style:style style:name="gr17" style:family="graphic" style:parent-style-name="objectwithoutfill">
      <style:graphic-properties draw:stroke="solid" svg:stroke-width="0.081cm" svg:stroke-color="#000000" draw:marker-start="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18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solid" draw:fill-color="#2ca02c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6.453cm" svg:y1="4.087cm" svg:x2="6.409cm" svg:y2="0.26cm">
          <text:p/>
        </draw:line>
        <draw:line draw:style-name="gr2" draw:text-style-name="P1" draw:layer="layout" svg:x1="6.487cm" svg:y1="4.07cm" svg:x2="11.235cm" svg:y2="4.07cm">
          <text:p/>
        </draw:line>
        <draw:custom-shape draw:style-name="gr3" draw:text-style-name="P2" draw:layer="layout" svg:width="0.15cm" svg:height="1.586cm" svg:x="11.248cm" svg:y="3.2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6.737cm" svg:y1="3.904cm" svg:x2="11.235cm" svg:y2="4.07cm">
          <text:p/>
        </draw:line>
        <draw:line draw:style-name="gr4" draw:text-style-name="P1" draw:layer="layout" svg:x1="6.775cm" svg:y1="3.833cm" svg:x2="6.917cm" svg:y2="7.626cm">
          <text:p/>
        </draw:line>
        <draw:line draw:style-name="gr5" draw:text-style-name="P1" draw:layer="layout" svg:x1="2.64cm" svg:y1="4.007cm" svg:x2="6.494cm" svg:y2="4.007cm">
          <text:p/>
        </draw:line>
        <draw:custom-shape draw:style-name="gr3" draw:text-style-name="P2" draw:layer="layout" svg:width="0.15cm" svg:height="1.586cm" draw:transform="rotate (1.5707963267949) translate (5.63cm 0.25cm)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6.801cm" svg:y1="7.626cm" svg:x2="6.409cm" svg:y2="0.26cm">
          <text:p/>
        </draw:line>
        <draw:custom-shape draw:style-name="gr7" draw:text-style-name="P3" draw:layer="layout" svg:width="0.15cm" svg:height="1.586cm" draw:transform="rotate (-0.785398163397449) translate (7.008cm 3.461cm)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799cm" svg:height="1.131cm" draw:transform="rotate (-3.14159265358979) translate (7.758cm 8.927cm)">
          <draw:image xlink:href="Pictures/1000000100000122000000AE44EDF858.png" xlink:type="simple" xlink:show="embed" xlink:actuate="onLoad" draw:mime-type="image/png">
            <text:p/>
          </draw:image>
        </draw:frame>
        <draw:line draw:style-name="gr9" draw:text-style-name="P1" draw:layer="layout" svg:x1="10.307cm" svg:y1="2.8cm" svg:x2="11.323cm" svg:y2="2.8cm">
          <text:p/>
        </draw:line>
        <draw:line draw:style-name="gr9" draw:text-style-name="P1" draw:layer="layout" svg:x1="10.307cm" svg:y1="2.8cm" svg:x2="10.307cm" svg:y2="3.054cm">
          <text:p/>
        </draw:line>
        <draw:line draw:style-name="gr9" draw:text-style-name="P1" draw:layer="layout" svg:x1="11.307cm" svg:y1="2.8cm" svg:x2="11.307cm" svg:y2="3.054cm">
          <text:p/>
        </draw:line>
        <draw:g draw:style-name="gr10">
          <svg:title>TexMaths</svg:title>
          <svg:desc>28§display§x§svg§600§FALSE§</svg:desc>
          <draw:g draw:style-name="gr11">
            <draw:path draw:style-name="gr12" draw:text-style-name="P5" draw:layer="layout" svg:width="0.383cm" svg:height="0.339cm" svg:x="10.582cm" svg:y="2.235cm" svg:viewBox="0 0 384 340" svg:d="M0 0c128 0 256 0 384 0 0 113 0 227 0 340-128 0-256 0-384 0 0-113 0-227 0-340z">
              <text:p/>
            </draw:path>
            <draw:path draw:style-name="gr13" draw:text-style-name="P6" draw:layer="layout" svg:width="0.483cm" svg:height="0.439cm" svg:x="10.532cm" svg:y="2.185cm" svg:viewBox="0 0 484 440" svg:d="M298 136c5-25 27-114 94-114 6 0 28 0 50 11-28 6-47 31-47 53 0 17 11 34 36 34 22 0 53-17 53-56 0-50-58-64-89-64-58 0-92 50-103 75-25-67-78-75-106-75-100 0-155 125-155 150 0 9 8 9 11 9 8 0 11 0 14-11 30-103 97-126 128-126 19 0 52 9 52 64 0 31-16 95-52 231-14 62-48 101-92 101-6 0-28 0-47-11 22-6 44-25 44-53 0-25-22-34-36-34-28 0-53 25-53 56 0 45 47 64 92 64 64 0 97-67 103-75 11 36 44 75 103 75 100 0 155-125 155-150 0-9-8-9-11-9-8 0-11 3-14 11-30 103-97 126-128 126-39 0-52-31-52-64 0-20 5-42 16-84 11-44 23-89 34-134z">
              <text:p/>
            </draw:path>
          </draw:g>
        </draw:g>
        <draw:custom-shape draw:style-name="gr14" draw:text-style-name="P8" draw:layer="layout" svg:width="2.54cm" svg:height="1.524cm" svg:x="0.159cm" svg:y="3.308cm">
          <text:p text:style-name="P7"><text:span text:style-name="T1">Laser</text:span></text:p>
          <draw:enhanced-geometry svg:viewBox="0 0 21600 21600" draw:type="rectangle" draw:enhanced-path="M 0 0 L 21600 0 21600 21600 0 21600 0 0 Z N"/>
        </draw:custom-shape>
        <draw:g draw:style-name="gr10">
          <svg:title>TexMaths</svg:title>
          <svg:desc>28§display§D§svg§600§TRUE§</svg:desc>
          <draw:g draw:style-name="gr11">
            <draw:path draw:style-name="gr13" draw:text-style-name="P6" draw:layer="layout" svg:width="0.749cm" svg:height="0.668cm" svg:x="5.232cm" svg:y="1.362cm" svg:viewBox="0 0 750 669" svg:d="M118 593c-12 37-12 45-90 45-17 0-28 0-28 20 0 11 8 11 28 11 108 0 216 0 325 0 204 0 397-207 397-420 0-140-84-249-229-249-111 0-221 0-331 0-19 0-30 0-30 20 0 11 8 11 28 11 13 0 30 0 41 3 17 0 23 2 23 14 0 5 0 8-3 19-44 176-88 351-131 526zM330 67c9-33 9-36 51-36 35 0 70 0 106 0 95 0 176 50 176 182 0 47-19 207-100 316-31 36-107 109-227 109-37 0-75 0-112 0-14 0-17 0-23 0-8-3-11-3-11-11 0-3 0-3 3-22 46-180 92-359 137-538z">
              <text:p/>
            </draw:path>
          </draw:g>
        </draw:g>
        <draw:frame draw:style-name="gr8" draw:text-style-name="P4" draw:layer="layout" svg:width="0.75cm" svg:height="0.669cm" svg:x="8.854cm" svg:y="4.566cm">
          <draw:image xlink:href="Pictures/1000061F0000010D000000F05F3DD127.svg" xlink:type="simple" xlink:show="embed" xlink:actuate="onLoad" draw:mime-type="image/svg+xml">
            <text:p/>
          </draw:image>
          <draw:image xlink:href="Pictures/100000010000000D0000000C8EE22471.png" xlink:type="simple" xlink:show="embed" xlink:actuate="onLoad" draw:mime-type="image/png"/>
          <svg:title>TexMaths</svg:title>
          <svg:desc>28§display§D§svg§600§TRUE§</svg:desc>
        </draw:frame>
        <draw:frame draw:style-name="gr15" draw:text-style-name="P9" draw:layer="layout" svg:width="3.528cm" svg:height="1.361cm" svg:x="6.673cm" svg:y="2.218cm">
          <draw:text-box>
            <text:p><text:span text:style-name="T2">Beam</text:span></text:p>
            <text:p><text:span text:style-name="T2">Splitter</text:span></text:p>
          </draw:text-box>
        </draw:frame>
        <draw:frame draw:style-name="gr8" draw:text-style-name="P4" draw:layer="layout" svg:width="2.729cm" svg:height="0.598cm" svg:x="3.111cm" svg:y="3.175cm">
          <draw:image xlink:href="Pictures/10002D58000005ED0000014D50BEF83D.svg" xlink:type="simple" xlink:show="embed" xlink:actuate="onLoad" draw:mime-type="image/svg+xml">
            <text:p/>
          </draw:image>
          <draw:image xlink:href="Pictures/100000010000004A00000010AE8FCC09.png" xlink:type="simple" xlink:show="embed" xlink:actuate="onLoad" draw:mime-type="image/png"/>
          <svg:title>TexMaths</svg:title>
          <svg:desc>18§display§\textcolor{red}{Ae^{i(kz - \omega t)}}§svg§600§TRUE§</svg:desc>
        </draw:frame>
        <draw:frame draw:style-name="gr8" draw:text-style-name="P4" draw:layer="layout" svg:width="3.479cm" svg:height="0.734cm" svg:x="3.013cm" svg:y="6.175cm">
          <draw:image xlink:href="Pictures/100030AC0000078E0000019913D393AB.svg" xlink:type="simple" xlink:show="embed" xlink:actuate="onLoad" draw:mime-type="image/svg+xml">
            <text:p/>
          </draw:image>
          <draw:image xlink:href="Pictures/100000010000005E00000014D7882015.png" xlink:type="simple" xlink:show="embed" xlink:actuate="onLoad" draw:mime-type="image/png"/>
          <svg:title>TexMaths</svg:title>
          <svg:desc>18§display§\textcolor{purple}{A_1e^{i(2kD - \omega t)}}§svg§600§TRUE§</svg:desc>
        </draw:frame>
        <draw:g draw:style-name="gr10">
          <svg:title>TexMaths</svg:title>
          <svg:desc>18§display§\textcolor{mplgreen}{A_2e^{i(2k(D+x) - \omega t)}}§svg§600§TRUE§</svg:desc>
          <draw:g draw:style-name="gr11">
            <draw:path draw:style-name="gr16" draw:text-style-name="P10" draw:layer="layout" svg:width="0.433cm" svg:height="0.45cm" svg:x="7.115cm" svg:y="6.315cm" svg:viewBox="0 0 434 451" svg:d="M92 379c-25 41-51 50-78 52-9 2-14 2-14 13 0 3 4 7 9 7 16 0 36-2 54-2 22 0 43 2 63 2 4 0 13 0 13-11 0-7-6-9-11-9-15 0-29-5-29-21 0-8 4-15 9-24 16-27 31-54 47-81 53 0 105 0 158 0 2 15 11 99 11 106 0 18-33 20-45 20-9 0-16 0-16 13 0 7 6 4 9 7 27 0 54-2 79-2 16 0 56 2 72 2 3 0 11 0 11-13 0-7-6-7-15-7-39 0-39-4-41-21-13-132-25-264-38-396-2-12-2-14-13-14-9 0-12 4-16 11-73 123-146 245-219 368zM167 286c42-69 83-138 124-207 7 69 14 138 20 207-48 0-96 0-144 0z">
              <text:p/>
            </draw:path>
            <draw:path draw:style-name="gr16" draw:text-style-name="P10" draw:layer="layout" svg:width="0.195cm" svg:height="0.292cm" svg:x="7.595cm" svg:y="6.568cm" svg:viewBox="0 0 196 293" svg:d="M196 212c-5 0-11 0-16 0 0 11-5 36-11 39-3 4-38 4-43 4-28 0-55 0-83 0 47-41 63-54 88-74 35-27 65-53 65-95 0-54-47-86-104-86-54 0-92 38-92 79 0 22 20 23 23 23 11 0 24-7 24-23 0-7-4-23-27-23 14-31 45-40 65-40 45 0 68 34 68 70 0 38-27 68-41 85-36 34-72 69-108 104-4 3-4 5-4 18 61 0 121 0 182 0 5-27 9-54 14-81z">
              <text:p/>
            </draw:path>
            <draw:path draw:style-name="gr16" draw:text-style-name="P10" draw:layer="layout" svg:width="0.242cm" svg:height="0.285cm" svg:x="7.88cm" svg:y="6.487cm" svg:viewBox="0 0 243 286" svg:d="M90 133c18 0 65-2 97-14 43-18 47-56 47-65 0-27-23-54-68-54-71 0-166 61-166 172 0 63 38 114 99 114 92 0 144-67 144-74 0-4-4-9-7-9-4 0-6 2-9 7-49 61-119 61-126 61-49 0-54-52-54-72 0-9 0-27 9-66 11 0 23 0 34 0zM59 119c26-96 90-105 107-105 30 0 46 18 46 40 0 65-100 65-126 65-9 0-18 0-27 0z">
              <text:p/>
            </draw:path>
            <draw:path draw:style-name="gr16" draw:text-style-name="P10" draw:layer="layout" svg:width="0.134cm" svg:height="0.295cm" svg:x="8.166cm" svg:y="6.214cm" svg:viewBox="0 0 135 296" svg:d="M122 16c0-7-5-16-18-16-10 0-23 11-23 23 0 8 5 17 18 17s23-11 23-24zM32 241c-1 5-3 10-3 18 0 19 18 37 41 37 45 0 65-61 65-68 0-5-5-5-7-5-7 0-7 3-9 7-11 36-29 54-47 54-9 0-11-6-11-16 0-9 4-18 7-27 4-13 9-25 15-36 3-11 20-51 21-56 0-5 2-11 2-14 0-22-18-38-41-38-43 0-65 59-65 68 0 6 5 4 7 6 7 0 7-2 9-8 11-37 31-53 47-53 7 0 11 3 11 16 0 9-2 16-13 43-9 24-19 48-29 72z">
              <text:p/>
            </draw:path>
            <draw:path draw:style-name="gr16" draw:text-style-name="P10" draw:layer="layout" svg:width="0.114cm" svg:height="0.439cm" svg:x="8.375cm" svg:y="6.175cm" svg:viewBox="0 0 115 440" svg:d="M106 0c-83 59-106 153-106 221 0 61 20 158 106 219 4 0 9 0 9-4 0-3 0-3-3-7-60-54-81-127-81-208 0-119 45-178 82-210 2-2 2-4 2-6 0-5-5-5-9-5z">
              <text:p/>
            </draw:path>
            <draw:path draw:style-name="gr16" draw:text-style-name="P10" draw:layer="layout" svg:width="0.195cm" svg:height="0.292cm" svg:x="8.549cm" svg:y="6.213cm" svg:viewBox="0 0 196 293" svg:d="M196 214c-5 0-9 0-14 0-2 9-7 36-13 39-3 2-38 2-43 2-27 0-54 0-81 0 47-39 61-52 88-74 33-25 63-52 63-95 0-54-47-86-104-86-54 0-92 40-92 79 0 23 20 25 23 25 11 0 24-7 24-23 0-7-2-24-25-24 14-30 43-41 64-41 44 0 67 34 67 70 0 40-27 70-41 85-36 35-71 70-107 106-5 3-5 3-5 16 61 0 122 0 184 0 4-27 8-53 12-79z">
              <text:p/>
            </draw:path>
            <draw:path draw:style-name="gr16" draw:text-style-name="P10" draw:layer="layout" svg:width="0.217cm" svg:height="0.31cm" svg:x="8.806cm" svg:y="6.2cm" svg:viewBox="0 0 218 311" svg:d="M106 13c1-3 2-6 2-8 0-1-2-5-7-5-9 0-45 4-58 4-3 1-9 1-9 10 0 6 6 6 11 6 22 0 22 3 22 7s0 5-2 11c-21 83-41 166-61 249-4 8-4 8-4 9 0 8 5 15 16 15s18-9 20-20c2 0 20-79 22-84 32 3 57 12 57 35 0 2 0 4-2 9-1 8-1 9-1 15 0 30 25 45 46 45 44 0 38-46 56-69 0-5-5-5-7-5-5 0-5 2-7 11-6 20-18 50-40 50-12 0-16-11-16-23 0-7 0-7 4-20 0-2 1-9 1-13 0-39-54-46-72-48 13-7 29-22 38-29 22-21 43-41 69-41 5 0 10 2 14 5-18 4-23 18-23 25 0 9 9 17 18 17 12 0 25-9 25-29 0-14-11-31-34-31-26 0-47 18-71 40-18 18-32 30-50 38 14-59 29-118 43-176z">
              <text:p/>
            </draw:path>
            <draw:path draw:style-name="gr16" draw:text-style-name="P10" draw:layer="layout" svg:width="0.114cm" svg:height="0.439cm" svg:x="9.103cm" svg:y="6.175cm" svg:viewBox="0 0 115 440" svg:d="M106 0c-83 59-106 153-106 221 0 61 20 158 106 219 4 0 9 0 9-4 0-3 0-3-3-7-60-54-81-127-81-208 0-119 46-178 82-210 2-2 2-4 2-6 0-5-5-5-9-5z">
              <text:p/>
            </draw:path>
            <draw:path draw:style-name="gr16" draw:text-style-name="P10" draw:layer="layout" svg:width="0.364cm" svg:height="0.299cm" svg:x="9.281cm" svg:y="6.205cm" svg:viewBox="0 0 365 300" svg:d="M52 266c-3 16-3 20-38 20-9 0-14 0-14 9 0 5 5 5 14 5 53 0 106 0 159 0 97 0 192-90 192-185 0-65-45-115-117-115-54 0-108 0-162 0-9 0-14 0-14 9 0 5 5 5 14 5 8 0 9 0 18 2 9 0 9 2 9 6 0 1 0 3-1 10-20 78-40 156-60 234zM153 31c4-15 4-17 22-17 19 0 38 0 57 0 49 0 90 26 90 87 0 9-4 86-48 136-17 20-56 49-110 49-20 0-40 0-60 0-14 0-14-2-14-6 1-3 0-2 2-9 20-80 41-160 61-240z">
              <text:p/>
            </draw:path>
            <draw:path draw:style-name="gr16" draw:text-style-name="P10" draw:layer="layout" svg:width="0.325cm" svg:height="0.324cm" svg:x="9.708cm" svg:y="6.232cm" svg:viewBox="0 0 326 325" svg:d="M175 174c45 0 90 0 134 0 8 0 17 0 17-11 0-10-9-10-17-10-44 0-89 0-134 0 0-46 0-91 0-137 0-5 0-16-11-16s-11 11-11 16c0 46 0 91 0 137-45 0-90 0-135 0-7 0-18 0-18 10 0 11 11 11 18 11 45 0 90 0 135 0 0 45 0 90 0 135 0 5 0 16 11 16s11-9 11-16c0-45 0-90 0-135z">
              <text:p/>
            </draw:path>
            <draw:path draw:style-name="gr16" draw:text-style-name="P10" draw:layer="layout" svg:width="0.235cm" svg:height="0.198cm" svg:x="10.088cm" svg:y="6.311cm" svg:viewBox="0 0 236 199" svg:d="M88 147c-3 16-18 40-41 40-2 0-15 0-24-7 18-6 20-22 20-24 0-9-9-16-18-16-12 0-25 11-25 27 0 22 25 32 47 32 20 0 38-12 48-32 11 23 36 32 53 32 52 0 79-55 79-68 0-5-5-3-7-5-8 0-8 2-9 7-9 30-36 54-62 54-16 0-27-13-27-29 0-11 11-52 24-101 9-34 29-44 43-44 2 0 14 0 25 5-14 5-20 16-20 25s8 16 18 16 24-9 24-27c0-25-27-32-45-32-24 0-40 14-51 32-7-19-28-32-52-32-50 0-79 54-79 68 0 6 7 6 9 6 5 0 5-2 7-8 11-34 40-53 61-53 15 0 27 7 27 28 0 9-5 31-9 47-5 20-10 40-16 59z">
              <text:p/>
            </draw:path>
            <draw:path draw:style-name="gr16" draw:text-style-name="P10" draw:layer="layout" svg:width="0.112cm" svg:height="0.439cm" svg:x="10.384cm" svg:y="6.175cm" svg:viewBox="0 0 113 440" svg:d="M7 0c-2 0-7 0-7 5 0 2 0 4 4 8 37 34 81 93 81 208 0 92-29 162-78 205-7 7-7 8-7 10 0 3 0 4 5 4 6 0 47-29 76-83 20-37 32-84 32-136 0-63-18-158-106-221z">
              <text:p/>
            </draw:path>
            <draw:path draw:style-name="gr16" draw:text-style-name="P10" draw:layer="layout" svg:width="0.298cm" svg:height="0.021cm" svg:x="10.599cm" svg:y="6.385cm" svg:viewBox="0 0 299 22" svg:d="M281 22c7 0 18 0 18-11s-11-11-18-11c-88 0-177 0-265 0-5 0-16 0-16 11s9 11 16 11c88 0 177 0 265 0z">
              <text:p/>
            </draw:path>
            <draw:path draw:style-name="gr16" draw:text-style-name="P10" draw:layer="layout" svg:width="0.287cm" svg:height="0.198cm" svg:x="10.96cm" svg:y="6.311cm" svg:viewBox="0 0 288 199" svg:d="M288 32c0-14-7-32-25-32-11 0-22 13-22 25 0 15 24 16 24 47 0 29-29 91-78 91-21 0-39-14-45-34 6-9 16-39 16-50 0-7-3-14-12-14-22 0-24 48-24 63-12 16-34 35-63 35-25 0-41-21-41-50 0-52 45-95 45-100 0-6-5-11-9-11-5 0-7 2-11 5-5 7-11 18-16 25-16 27-27 65-27 97 0 34 14 70 56 70 29 0 54-19 70-43 9 25 29 43 56 43 79 0 106-131 106-167z">
              <text:p/>
            </draw:path>
            <draw:path draw:style-name="gr16" draw:text-style-name="P10" draw:layer="layout" svg:width="0.148cm" svg:height="0.279cm" svg:x="11.299cm" svg:y="6.231cm" svg:viewBox="0 0 149 280" svg:d="M90 101c15 0 30 0 45 0 9 0 14 0 14-9 0-6-5-6-12-6-15 0-29 0-43 0 5-22 10-44 16-66 2-2 2-4 2-6 0-9-6-14-15-14-11 0-18 7-21 18-4 13 3-9-17 68-15 0-30 0-45 0-9 0-14 0-14 9 0 6 5 6 13 6 14 0 28 0 43 0-9 34-18 69-27 104-2 11-7 27-7 32 0 27 23 43 48 43 49 0 76-63 76-68s-4-4-6-5c-5 0-7 1-10 9-13 26-35 52-60 52-9 0-14-6-14-22 0-5 2-14 2-18 10-42 21-85 32-127z">
              <text:p/>
            </draw:path>
            <draw:path draw:style-name="gr16" draw:text-style-name="P10" draw:layer="layout" svg:width="0.114cm" svg:height="0.439cm" svg:x="11.502cm" svg:y="6.175cm" svg:viewBox="0 0 115 440" svg:d="M9 0c-4 0-9 0-9 5 0 2 2 4 4 8 37 34 81 93 81 208 0 92-29 162-76 205-9 7-9 8-9 10 0 3 2 4 5 4 6 0 49-29 78-83 20-37 32-84 32-136 0-63-20-158-106-221z">
              <text:p/>
            </draw:path>
          </draw:g>
        </draw:g>
        <draw:line draw:style-name="gr17" draw:text-style-name="P4" draw:layer="layout" svg:x1="11.582cm" svg:y1="4.01cm" svg:x2="12.377cm" svg:y2="4.01cm">
          <text:p/>
        </draw:line>
        <draw:g draw:style-name="gr10">
          <svg:title>TexMaths</svg:title>
          <svg:desc>28§display§v§svg§600§FALSE§</svg:desc>
          <draw:g draw:style-name="gr11">
            <draw:path draw:style-name="gr12" draw:text-style-name="P5" draw:layer="layout" svg:width="0.33cm" svg:height="0.339cm" svg:x="11.68cm" svg:y="3.336cm" svg:viewBox="0 0 331 340" svg:d="M0 0c110 0 221 0 331 0 0 113 0 227 0 340-110 0-221 0-331 0 0-113 0-227 0-340z">
              <text:p/>
            </draw:path>
            <draw:path draw:style-name="gr13" draw:text-style-name="P6" draw:layer="layout" svg:width="0.425cm" svg:height="0.439cm" svg:x="11.633cm" svg:y="3.286cm" svg:viewBox="0 0 426 440" svg:d="M426 67c0-50-25-67-42-67-25 0-47 25-47 47 0 11 3 17 14 28 19 20 33 45 33 81 0 39-58 262-172 262-51 0-73-34-73-84 0-56 28-125 56-206 8-17 14-31 14-47 0-45-34-81-81-81-92 0-128 142-128 150 0 9 8 9 11 9 11 0 11 0 17-17 28-97 69-120 97-120 9 0 25 0 25 31 0 25-11 50-16 67-45 114-56 158-56 200 0 103 86 120 131 120 161 0 217-320 217-373z">
              <text:p/>
            </draw:path>
          </draw:g>
        </draw:g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7 20 13" svg:d="M0 20l10-13 10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23cm" fo:margin-bottom="0cm" fo:text-indent="0cm"/>
      <style:text-properties fo:font-size="15.800000190734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66cm" fo:margin-bottom="0cm" fo:text-indent="0cm"/>
      <style:text-properties fo:font-size="13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11cm" fo:margin-bottom="0cm" fo:text-indent="0cm"/>
      <style:text-properties fo:font-size="11.300000190734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55cm" fo:margin-bottom="0cm" fo:text-indent="0cm"/>
      <style:text-properties fo:font-size="11.300000190734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55cm" fo:margin-bottom="0cm" fo:text-indent="0cm"/>
      <style:text-properties fo:font-size="11.300000190734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55cm" fo:margin-bottom="0cm" fo:text-indent="0cm"/>
      <style:text-properties fo:font-size="11.300000190734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55cm" fo:margin-bottom="0cm" fo:text-indent="0cm"/>
      <style:text-properties fo:font-size="11.300000190734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55cm" fo:margin-bottom="0cm" fo:text-indent="0cm"/>
      <style:text-properties fo:font-size="11.300000190734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2.7cm" fo:page-height="8.8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299cm" svg:x="1cm" svg:y="3.123cm"/>
      <draw:page-thumbnail draw:layer="backgroundobjects" svg:width="8.999cm" svg:height="6.299cm" svg:x="1cm" svg:y="11.699cm"/>
      <draw:page-thumbnail draw:layer="backgroundobjects" svg:width="8.999cm" svg:height="6.299cm" svg:x="1cm" svg:y="20.275cm"/>
      <draw:page-thumbnail draw:layer="backgroundobjects" svg:width="8.999cm" svg:height="6.299cm" svg:x="11cm" svg:y="3.123cm"/>
      <draw:page-thumbnail draw:layer="backgroundobjects" svg:width="8.999cm" svg:height="6.299cm" svg:x="11cm" svg:y="11.699cm"/>
      <draw:page-thumbnail draw:layer="backgroundobjects" svg:width="8.999cm" svg:height="6.299cm" svg:x="11cm" svg:y="20.27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1.43cm" svg:height="1.484cm" svg:x="0.635cm" svg:y="0.352cm" presentation:class="title" presentation:placeholder="true">
        <draw:text-box/>
      </draw:frame>
      <draw:frame presentation:style-name="Default-outline1" draw:layer="backgroundobjects" svg:width="11.43cm" svg:height="5.156cm" svg:x="0.635cm" svg:y="2.079cm" presentation:class="outline" presentation:placeholder="true">
        <draw:text-box/>
      </draw:frame>
      <draw:frame presentation:style-name="Mpr1" draw:text-style-name="MP2" draw:layer="backgroundobjects" svg:width="2.959cm" svg:height="0.613cm" svg:x="0.635cm" svg:y="8.0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025cm" svg:height="0.613cm" svg:x="4.342cm" svg:y="8.0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.959cm" svg:height="0.613cm" svg:x="9.105cm" svg:y="8.0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2T10:50:29.167193271</meta:creation-date>
    <dc:date>2026-07-10T01:23:12.400736727</dc:date>
    <meta:editing-duration>PT11H59M38S</meta:editing-duration>
    <meta:editing-cycles>9</meta:editing-cycles>
    <meta:generator>LibreOffice/24.2.7.2$Linux_X86_64 LibreOffice_project/420$Build-2</meta:generator>
    <meta:print-date>2025-09-02T22:58:53.726094954</meta:print-date>
    <meta:printed-by>PDF files</meta:printed-by>
    <meta:document-statistic meta:object-count="71"/>
  </office:meta>
</office:document-meta>
</file>